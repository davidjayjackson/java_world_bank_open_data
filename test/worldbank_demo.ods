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402in"/>
    </style:style>
    <style:style style:name="co2" style:family="table-column">
      <style:table-column-properties fo:break-before="auto" style:column-width="1.771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 table:null-year="1950"/>
      <table:table table:name="World Bank Demo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number-columns-repeated="3"/>
        <table:table-row table:style-name="ro1">
          <table:table-cell office:value-type="string" calcext:value-type="string">
            <text:p>World Bank Open Data Calc Add-In - demo (US / UK GDP)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No API key needed. Recalc with Ctrl+Shift+F9 if a cell shows #FETCHING.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#FETCHING means a background fetch just started - recalc again once it settles.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Live result</text:p>
          </table:table-cell>
          <table:table-cell office:value-type="string" calcext:value-type="string">
            <text:p>Formula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WBVALUE (US GDP, 2020)</text:p>
          </table:table-cell>
          <table:table-cell table:style-name="ce1" table:formula="of:=COM.EXAMPLE.WORLDBANK.WORLDBANKIMPL.WBVALUE(&quot;US&quot;;&quot;NY.GDP.MKTP.CD&quot;;2020)" office:value-type="float" office:value="21375281000000" calcext:value-type="float">
            <text:p>21375281000000</text:p>
          </table:table-cell>
          <table:table-cell table:style-name="ce2" office:value-type="string" calcext:value-type="string">
            <text:p>=WBVALUE("US";"NY.GDP.MKTP.CD";2020)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WBVALUE (US GDP, most recent)</text:p>
          </table:table-cell>
          <table:table-cell table:formula="of:=COM.EXAMPLE.WORLDBANK.WORLDBANKIMPL.WBVALUE(&quot;US&quot;;&quot;NY.GDP.MKTP.CD&quot;)" office:value-type="float" office:value="30769700000000" calcext:value-type="float">
            <text:p>30769700000000</text:p>
          </table:table-cell>
          <table:table-cell table:style-name="ce2" office:value-type="string" calcext:value-type="string">
            <text:p>=WBVALUE("US";"NY.GDP.MKTP.CD")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WBMETA (indicator name)</text:p>
          </table:table-cell>
          <table:table-cell table:formula="of:=COM.EXAMPLE.WORLDBANK.WORLDBANKIMPL.WBMETA(&quot;NY.GDP.MKTP.CD&quot;)" office:value-type="string" office:string-value="GDP (current US$)" calcext:value-type="string">
            <text:p>GDP (current US$)</text:p>
          </table:table-cell>
          <table:table-cell table:style-name="ce2" office:value-type="string" calcext:value-type="string">
            <text:p>=WBMETA("NY.GDP.MKTP.CD")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WBLASTERROR</text:p>
          </table:table-cell>
          <table:table-cell table:formula="of:=COM.EXAMPLE.WORLDBANK.WORLDBANKIMPL.WBLASTERROR()" office:value-type="string" office:string-value="World Bank API error: The provided parameter value is not valid" calcext:value-type="string">
            <text:p>World Bank API error: The provided parameter value is not valid</text:p>
          </table:table-cell>
          <table:table-cell table:style-name="ce2" office:value-type="string" calcext:value-type="string">
            <text:p>=WBLASTERROR()</text:p>
          </table:table-cell>
          <table:table-cell table:style-name="Default" table:number-columns-repeated="3"/>
        </table:table-row>
        <table:table-row table:style-name="ro1" table:number-rows-repeated="4"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 calcext:value-type="string">
            <text:p>WBLATEST (US GDP: value, year)</text:p>
          </table:table-cell>
          <table:table-cell table:number-matrix-columns-spanned="2" table:number-matrix-rows-spanned="1" table:formula="of:=COM.EXAMPLE.WORLDBANK.WORLDBANKIMPL.WBLATEST(&quot;US&quot;;&quot;NY.GDP.MKTP.CD&quot;)" office:value-type="float" office:value="30769700000000" calcext:value-type="float">
            <text:p>30769700000000</text:p>
          </table:table-cell>
          <table:table-cell office:value-type="float" office:value="2025" calcext:value-type="float">
            <text:p>2025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{=WBLATEST("US";"NY.GDP.MKTP.CD")} <text:s/>(select range, Ctrl+Shift+Enter)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 calcext:value-type="string">
            <text:p>WBSERIES (US GDP, 2015-2024)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value</text:p>
          </table:table-cell>
          <table:table-cell/>
          <table:table-cell table:style-name="Default" table:number-columns-repeated="3"/>
        </table:table-row>
        <table:table-row table:style-name="ro1">
          <table:table-cell table:number-matrix-columns-spanned="2" table:number-matrix-rows-spanned="10" table:formula="of:=COM.EXAMPLE.WORLDBANK.WORLDBANKIMPL.WBSERIES(&quot;US&quot;;&quot;NY.GDP.MKTP.CD&quot;;2015;2024)" office:value-type="float" office:value="2015" calcext:value-type="float">
            <text:p>2015</text:p>
          </table:table-cell>
          <table:table-cell office:value-type="float" office:value="18295019000000" calcext:value-type="float">
            <text:p>18295019000000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8804913000000" calcext:value-type="float">
            <text:p>18804913000000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9612102000000" calcext:value-type="float">
            <text:p>19612102000000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0656516000000" calcext:value-type="float">
            <text:p>20656516000000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539982000000" calcext:value-type="float">
            <text:p>21539982000000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1375281000000" calcext:value-type="float">
            <text:p>21375281000000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3725645000000" calcext:value-type="float">
            <text:p>23725645000000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6054614000000" calcext:value-type="float">
            <text:p>26054614000000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27811517000000" calcext:value-type="float">
            <text:p>27811517000000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29298013000000" calcext:value-type="float">
            <text:p>29298013000000</text:p>
          </table:table-cell>
          <table:table-cell/>
          <table:table-cell table:style-name="Default" table:number-columns-repeated="3"/>
        </table:table-row>
        <table:table-row table:style-name="ro1"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 calcext:value-type="string">
            <text:p>{=WBSERIES("US";"NY.GDP.MKTP.CD";2015;2024)} <text:s/>(select range, Ctrl+Shift+Enter)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 calcext:value-type="string">
            <text:p>WBSERIES multi-country (US;GB GDP, 2022-2023) - adds a country column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value</text:p>
          </table:table-cell>
          <table:table-cell table:style-name="Default" table:number-columns-repeated="3"/>
        </table:table-row>
        <table:table-row table:style-name="ro1">
          <table:table-cell table:number-matrix-columns-spanned="3" table:number-matrix-rows-spanned="4" table:formula="of:=COM.EXAMPLE.WORLDBANK.WORLDBANKIMPL.WBSERIES(&quot;US;GB&quot;;&quot;NY.GDP.MKTP.CD&quot;;2022;2023)" office:value-type="string" office:string-value="GB" calcext:value-type="string">
            <text:p>GB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3181244350465.41" calcext:value-type="float">
            <text:p>3181244350465.41</text:p>
          </table:table-cell>
          <table:table-cell table:style-name="Default" table:number-columns-repeated="3"/>
        </table:table-row>
        <table:table-row table:style-name="ro1">
          <table:table-cell office:value-type="string" office:string-value="US" calcext:value-type="string">
            <text:p>US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26054614000000" calcext:value-type="float">
            <text:p>26054614000000</text:p>
          </table:table-cell>
          <table:table-cell table:style-name="Default" table:number-columns-repeated="3"/>
        </table:table-row>
        <table:table-row table:style-name="ro1">
          <table:table-cell office:value-type="string" office:string-value="GB" calcext:value-type="string">
            <text:p>GB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3420796653789.08" calcext:value-type="float">
            <text:p>3420796653789.08</text:p>
          </table:table-cell>
          <table:table-cell table:style-name="Default" table:number-columns-repeated="3"/>
        </table:table-row>
        <table:table-row table:style-name="ro1">
          <table:table-cell office:value-type="string" office:string-value="US" calcext:value-type="string">
            <text:p>US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27811517000000" calcext:value-type="float">
            <text:p>27811517000000</text:p>
          </table:table-cell>
          <table:table-cell table:style-name="Default" table:number-columns-repeated="3"/>
        </table:table-row>
        <table:table-row table:style-name="ro1"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 calcext:value-type="string">
            <text:p>{=WBSERIES("US;GB";"NY.GDP.MKTP.CD";2022;2023)} <text:s/>(select range, Ctrl+Shift+Enter)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 calcext:value-type="string">
            <text:p>WBVALUE with an invalid indicator code (expect #ERR)</text:p>
          </table:table-cell>
          <table:table-cell table:formula="of:=COM.EXAMPLE.WORLDBANK.WORLDBANKIMPL.WBVALUE(&quot;US&quot;;&quot;BOGUS.INDICATOR.XYZ&quot;)" office:value-type="string" office:string-value="#ERR" calcext:value-type="string">
            <text:p>#ERR</text:p>
          </table:table-cell>
          <table:table-cell table:style-name="ce2" office:value-type="string" calcext:value-type="string">
            <text:p>=WBVALUE("US";"BOGUS.INDICATOR.XYZ")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16T19:45:20.962412178</meta:creation-date>
    <dc:date>2026-07-16T19:45:28.420229742</dc:date>
    <meta:editing-duration>PT7S</meta:editing-duration>
    <meta:editing-cycles>1</meta:editing-cycles>
    <meta:document-statistic meta:table-count="1" meta:cell-count="66" meta:object-count="0"/>
    <meta:generator>LibreOffice/26.2.4.2$Linux_X86_64 LibreOffice_project/0229ac93fcf0d7cbc6376066c6f35021cef002dc</meta:generator>
  </office:meta>
</office:document-meta>
</file>